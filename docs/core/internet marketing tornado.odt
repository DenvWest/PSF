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16.224cm" table:align="left"/>
    </style:style>
    <style:style style:name="Tabel1.A" style:family="table-column">
      <style:table-column-properties style:column-width="1.93cm"/>
    </style:style>
    <style:style style:name="Tabel1.B" style:family="table-column">
      <style:table-column-properties style:column-width="3.193cm"/>
    </style:style>
    <style:style style:name="Tabel1.C" style:family="table-column">
      <style:table-column-properties style:column-width="11.102cm"/>
    </style:style>
    <style:style style:name="Tabel1.A1" style:family="table-cell">
      <style:table-cell-properties style:vertical-align="middle" fo:padding="0.049cm" fo:border="none"/>
    </style:style>
    <style:style style:name="Tabel2" style:family="table">
      <style:table-properties style:width="17cm" table:align="left"/>
    </style:style>
    <style:style style:name="Tabel2.A" style:family="table-column">
      <style:table-column-properties style:column-width="2.558cm"/>
    </style:style>
    <style:style style:name="Tabel2.B" style:family="table-column">
      <style:table-column-properties style:column-width="5.918cm"/>
    </style:style>
    <style:style style:name="Tabel2.C" style:family="table-column">
      <style:table-column-properties style:column-width="8.525cm"/>
    </style:style>
    <style:style style:name="Tabel2.A1" style:family="table-cell">
      <style:table-cell-properties style:vertical-align="middle" fo:padding="0.049cm" fo:border="none"/>
    </style:style>
    <style:style style:name="Tabel3" style:family="table">
      <style:table-properties style:width="16.24cm" table:align="left"/>
    </style:style>
    <style:style style:name="Tabel3.A" style:family="table-column">
      <style:table-column-properties style:column-width="3.939cm"/>
    </style:style>
    <style:style style:name="Tabel3.B" style:family="table-column">
      <style:table-column-properties style:column-width="7.205cm"/>
    </style:style>
    <style:style style:name="Tabel3.C" style:family="table-column">
      <style:table-column-properties style:column-width="5.096cm"/>
    </style:style>
    <style:style style:name="Tabel3.A1" style:family="table-cell">
      <style:table-cell-properties style:vertical-align="middle" fo:padding="0.049cm" fo:border="none"/>
    </style:style>
    <style:style style:name="Tabel4" style:family="table">
      <style:table-properties style:width="13.527cm" table:align="left"/>
    </style:style>
    <style:style style:name="Tabel4.A" style:family="table-column">
      <style:table-column-properties style:column-width="2.058cm"/>
    </style:style>
    <style:style style:name="Tabel4.B" style:family="table-column">
      <style:table-column-properties style:column-width="11.469cm"/>
    </style:style>
    <style:style style:name="Tabel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oofdstuk 8 &amp; 9 — Aandacht &amp; Conversie (CRO)</text:h>
      <text:h text:style-name="Heading_20_3" text:outline-level="3">Accelerated Mobile Pages (AMP)</text:h>
      <text:p text:style-name="Text_20_body">Google's open-source framework voor snelle mobiele pagina's. Relevant maar niet toegepast — Next.js server components + <text:span text:style-name="Source_20_Text">next/image</text:span> lazy loading bieden vergelijkbare performance voordelen zonder de beperkingen van AMP.</text:p>
      <text:h text:style-name="Heading_20_3" text:outline-level="3">Conversion Rate Optimization (CRO) — Het Tornado-model</text:h>
      <text:p text:style-name="Text_20_body">Drie fasen van aandacht:</text:p>
      <text:p text:style-name="Text_20_body"><text:span text:style-name="Strong_20_Emphasis">1. Aandacht verdienen (&lt; 2 seconden)</text:span></text:p>
      <text:list text:style-name="L1">
        <text:list-item>
          <text:p text:style-name="P1">De bezoeker moet in één oogopslag zien wat je doet en voor wie </text:p>
        </text:list-item>
        <text:list-item>
          <text:p text:style-name="P1">Marketing is herkenning — geen clickbait, maar directe relevantie </text:p>
        </text:list-item>
        <text:list-item>
          <text:p text:style-name="P2">"Wat hebben ze aan mij?" is de kernvraag </text:p>
        </text:list-item>
      </text:list>
      <text:p text:style-name="Text_20_body"><text:span text:style-name="Strong_20_Emphasis">2. Aandacht vasthouden (2–10 seconden)</text:span></text:p>
      <text:list text:style-name="L2">
        <text:list-item>
          <text:p text:style-name="P3">De bezoeker herkent zichzelf in het probleem </text:p>
        </text:list-item>
        <text:list-item>
          <text:p text:style-name="P3">Hapklare blokken, visuele elementen, motion </text:p>
        </text:list-item>
        <text:list-item>
          <text:p text:style-name="P4">Geen informatieoverload </text:p>
        </text:list-item>
      </text:list>
      <text:p text:style-name="Text_20_body"><text:span text:style-name="Strong_20_Emphasis">3. Aandacht verzilveren (conversie)</text:span></text:p>
      <text:list text:style-name="L3">
        <text:list-item>
          <text:p text:style-name="P5">Eén primaire call-to-action per pagina </text:p>
        </text:list-item>
        <text:list-item>
          <text:p text:style-name="P6">Minimale keuzestress </text:p>
        </text:list-item>
      </text:list>
      <text:h text:style-name="Heading_20_3" text:outline-level="3">WIIFM — "What's In It For Me?"</text:h>
      <text:p text:style-name="Text_20_body">Elke pagina, elke kop, elke CTA moet het voordeel voor de bezoeker uitspreken. Niet wat jij doet, maar wat het voor hém oplevert.</text:p>
      <text:p text:style-name="Text_20_body"><text:span text:style-name="Strong_20_Emphasis">Toepassing PerfectSupplement:</text:span></text:p>
      <text:list text:style-name="L4">
        <text:list-item>
          <text:p text:style-name="P7">Niet: "Wij vergelijken supplementen op biobeschikbaarheid" </text:p>
        </text:list-item>
        <text:list-item>
          <text:p text:style-name="P8">Wel: "Ontdek welk supplement écht werkt voor jouw situatie" </text:p>
        </text:list-item>
      </text:list>
      <text:h text:style-name="Heading_20_3" text:outline-level="3">Framing</text:h>
      <text:p text:style-name="Text_20_body">De eerste indruk bepaalt de interpretatie. De nadruk moet liggen op de boodschap, niet op de techniek erachter.</text:p>
      <text:p text:style-name="Text_20_body"><text:span text:style-name="Strong_20_Emphasis">Voorbeeld</text:span>: "De grootste fietsenwinkel van NL" — de claim framed het bedrijf als marktleider, ongeacht of dat meetbaar waar is.</text:p>
      <text:p text:style-name="Text_20_body"><text:span text:style-name="Strong_20_Emphasis">Toepassing PerfectSupplement:</text:span> Positionering als "De Consumentenbond van supplementen" framed het platform als objectief en betrouwbaar. Dit is sterker dan "We vergelijken supplementen."</text:p>
      <text:h text:style-name="Heading_20_3" text:outline-level="3">Keuzestress — The Paradox of Choice</text:h>
      <text:p text:style-name="Text_20_body">Teveel opties leiden tot keuzeverlamming. Een website is geen webshop — als de bezoeker te veel keuzes tegelijk ziet, kiest hij niets.</text:p>
      <text:p text:style-name="Text_20_body"><text:soft-page-break/><text:span text:style-name="Strong_20_Emphasis">Toepassing PerfectSupplement:</text:span></text:p>
      <text:list text:style-name="L5">
        <text:list-item>
          <text:p text:style-name="P9">Max 3–4 producten per vergelijkingspagina (geen 8) </text:p>
        </text:list-item>
        <text:list-item>
          <text:p text:style-name="P9">Max 1 primaire CTA per pagina </text:p>
        </text:list-item>
        <text:list-item>
          <text:p text:style-name="P9">Intake flow als "keuzereductie": het systeem kiest voor je op basis van je profiel </text:p>
        </text:list-item>
        <text:list-item>
          <text:p text:style-name="P10">Vergelijkingspagina's: geen supplement-catalogus, maar gefilterd advies </text:p>
        </text:list-item>
      </text:list>
      <text:h text:style-name="Heading_20_3" text:outline-level="3">Website vs. Webshop</text:h>
      <text:p text:style-name="Text_20_body">"Maak van een website geen webshop en van een webshop geen website." PerfectSupplement is een informatieplatform met affiliate links — geen webshop. De focus moet liggen op advies en vergelijking, niet op productcatalogi.</text:p>
      <text:p text:style-name="Horizontal_20_Line"/>
      <text:h text:style-name="Heading_20_2" text:outline-level="2">Hoofdstuk 10 — Attention-Driven Design &amp; UX</text:h>
      <text:h text:style-name="Heading_20_3" text:outline-level="3">Conversion Centered Design</text:h>
      <text:p text:style-name="Text_20_body">Eén keuze, één call-to-action staat centraal per pagina.</text:p>
      <text:p text:style-name="Text_20_body"><text:span text:style-name="Strong_20_Emphasis">Toepassing PerfectSupplement:</text:span></text:p>
      <text:list text:style-name="L6">
        <text:list-item>
          <text:p text:style-name="P11">Leefstijlcheck-knop als primaire CTA op elke pagina </text:p>
        </text:list-item>
        <text:list-item>
          <text:p text:style-name="P11">Supplementvergelijking als secundaire actie (pas na intake of via vergelijkingspagina) </text:p>
        </text:list-item>
        <text:list-item>
          <text:p text:style-name="P12">Steeds specifieker worden: intake → advies → supplement → aankoop </text:p>
        </text:list-item>
      </text:list>
      <text:h text:style-name="Heading_20_3" text:outline-level="3">Primaire en Secundaire Huisstijlkleur</text:h>
      <text:p text:style-name="Text_20_body">De secundaire kleur wordt ingezet voor actiegerichte website-elementen (knoppen, CTA's, highlights). De primaire kleur voor structuur en vertrouwen.</text:p>
      <text:h text:style-name="Heading_20_3" text:outline-level="3">Interruptie-elementen</text:h>
      <text:p text:style-name="Text_20_body">Elementen die de scroll onderbreken en aandacht trekken:</text:p>
      <text:list text:style-name="L7">
        <text:list-item>
          <text:p text:style-name="P13"><text:span text:style-name="Strong_20_Emphasis">Magnet</text:span>: overlapt content, valt op (bijv. Leefstijlcheck pop-up na 3 seconden) </text:p>
        </text:list-item>
        <text:list-item>
          <text:p text:style-name="P13"><text:span text:style-name="Strong_20_Emphasis">Motion provides meaning</text:span>: animaties op CTA's, scores die oplopen, elementen die in beeld vliegen </text:p>
        </text:list-item>
        <text:list-item>
          <text:p text:style-name="P13"><text:span text:style-name="Strong_20_Emphasis">Split content</text:span>: tekst links, afbeelding rechts — verdeelt de pagina in hapklare blokken </text:p>
        </text:list-item>
        <text:list-item>
          <text:p text:style-name="P13"><text:span text:style-name="Strong_20_Emphasis">Progress bar</text:span>: geeft gevoel van controle (bijv. "3/6 domeinen ingevuld") </text:p>
        </text:list-item>
        <text:list-item>
          <text:p text:style-name="P14"><text:span text:style-name="Strong_20_Emphasis">Geanimeerde teksteffecten</text:span>: cirkel om een woord, onderstreping die verschijnt </text:p>
        </text:list-item>
      </text:list>
      <text:p text:style-name="Text_20_body"><text:span text:style-name="Strong_20_Emphasis">Statistiek</text:span>: Een bezoeker blijft gemiddeld 2,6 seconden op een site. Alles wat in die tijd niet herkend wordt, is verloren.</text:p>
      <text:h text:style-name="Heading_20_3" text:outline-level="3">De Witte Doktersjas</text:h>
      <text:p text:style-name="Text_20_body">Autoriteit uitstralen als specialist. Een leefstijlcoach of therapeut met een duidelijk profiel en ervaring geeft vertrouwen.</text:p>
      <text:p text:style-name="Text_20_body"><text:span text:style-name="Strong_20_Emphasis">Toepassing PerfectSupplement:</text:span></text:p>
      <text:list text:style-name="L8">
        <text:list-item>
          <text:p text:style-name="P15"><text:soft-page-break/>Leefstijlcheck positioneren als professioneel instrument, niet als "quizje" </text:p>
        </text:list-item>
        <text:list-item>
          <text:p text:style-name="P15">Eventueel samenwerking met leefstijlcoaches/therapeuten als doorverwijzing </text:p>
        </text:list-item>
        <text:list-item>
          <text:p text:style-name="P16">B2B white-label voor coaches (al voorbereid in database met <text:span text:style-name="Source_20_Text">organization_id</text:span>) </text:p>
        </text:list-item>
      </text:list>
      <text:p text:style-name="Horizontal_20_Line"/>
      <text:h text:style-name="Heading_20_2" text:outline-level="2">Hoofdstuk 11 — Landingspagina's &amp; Conversiepagina's</text:h>
      <text:h text:style-name="Heading_20_3" text:outline-level="3">Squeeze Pages</text:h>
      <text:p text:style-name="Text_20_body">De hele pagina staat in het teken van één call-to-action. Van boven naar beneden wordt de bezoeker begeleid naar die ene actie.</text:p>
      <text:p text:style-name="Text_20_body"><text:span text:style-name="Strong_20_Emphasis">Uitzondering</text:span>: Anchorlinks — geven de bezoeker overzicht en controle om verschillende onderdelen te navigeren. Dit is SEO-vriendelijk (Google kan secties apart indexeren).</text:p>
      <text:h text:style-name="Heading_20_3" text:outline-level="3">Elke Pagina Heeft Een Doel</text:h>
      <text:p text:style-name="Text_20_body">"Wanneer een pagina geen specifiek doel of concrete actie oplevert, dan is die overbodig."</text:p>
      <text:p text:style-name="Text_20_body"><text:span text:style-name="Strong_20_Emphasis">Homepage</text:span> is de uitzondering: knooppunt van belangrijke instappaden.</text:p>
      <text:p text:style-name="Text_20_body"><text:span text:style-name="Strong_20_Emphasis">Toepassing PerfectSupplement:</text:span></text:p>
      <text:list text:style-name="L9">
        <text:list-item>
          <text:p text:style-name="P17">Elke pagina heeft één primaire actie (Leefstijlcheck starten, vergelijking bekijken, artikel lezen) </text:p>
        </text:list-item>
        <text:list-item>
          <text:p text:style-name="P18">Pagina's zonder doel → verwijderen of samenvoegen (zie Systeemplan: UX-vereenvoudiging) </text:p>
        </text:list-item>
      </text:list>
      <text:h text:style-name="Heading_20_3" text:outline-level="3">Steady State Emotion</text:h>
      <text:p text:style-name="Text_20_body">De doelgroep heeft een bepaalde behoefte, uitdaging, pijnpunt of angst vóórdat ze op de pagina komen. Die emotie is het vertrekpunt — niet je product.</text:p>
      <text:p text:style-name="Text_20_body"><text:span text:style-name="Strong_20_Emphasis">Toepassing PerfectSupplement (mannen 40+):</text:span></text:p>
      <text:list text:style-name="L10">
        <text:list-item>
          <text:p text:style-name="P19"><text:span text:style-name="Strong_20_Emphasis">Pijnpunt</text:span>: minder energie, slechter slapen, meer stress, lichaam dat niet meer meedoet </text:p>
        </text:list-item>
        <text:list-item>
          <text:p text:style-name="P19"><text:span text:style-name="Strong_20_Emphasis">Angst</text:span>: veroudering, verlies van vitaliteit, "is dit het nu?" </text:p>
        </text:list-item>
        <text:list-item>
          <text:p text:style-name="P20"><text:span text:style-name="Strong_20_Emphasis">Behoefte</text:span>: controle terugpakken, begrijpen wat er verandert, concrete stappen </text:p>
        </text:list-item>
      </text:list>
      <text:h text:style-name="Heading_20_3" text:outline-level="3">Target State Emotion</text:h>
      <text:p text:style-name="Text_20_body">Waar wil de bezoeker naartoe? Het verschil tussen steady state en target state is de motivatie om actie te ondernemen.</text:p>
      <text:p text:style-name="Text_20_body"><text:span text:style-name="Strong_20_Emphasis">Toepassing PerfectSupplement:</text:span></text:p>
      <text:list text:style-name="L11">
        <text:list-item>
          <text:p text:style-name="P21">Steady state: "Ik ben altijd moe en weet niet waarom" </text:p>
        </text:list-item>
        <text:list-item>
          <text:p text:style-name="P21">Target state: "Ik begrijp wat er aan de hand is en weet wat ik moet doen" </text:p>
        </text:list-item>
        <text:list-item>
          <text:p text:style-name="P22">De Leefstijlcheck is de brug tussen die twee emoties </text:p>
        </text:list-item>
      </text:list>
      <text:p text:style-name="Horizontal_20_Line"/>
      <text:h text:style-name="Heading_20_2" text:outline-level="2"><text:soft-page-break/>Hoofdstuk 12 — Gedragspsychologie &amp; Neuromarketing</text:h>
      <text:h text:style-name="Heading_20_3" text:outline-level="3">AIDA-formule</text:h>
      <table:table table:name="Tabel1" table:style-name="Tabel1">
        <table:table-column table:style-name="Tabel1.A"/>
        <table:table-column table:style-name="Tabel1.B"/>
        <table:table-column table:style-name="Tabel1.C"/>
        <table:table-header-rows>
          <table:table-row>
            <table:table-cell table:style-name="Tabel1.A1" office:value-type="string">
              <text:p text:style-name="Table_20_Heading">Fase</text:p>
            </table:table-cell>
            <table:table-cell table:style-name="Tabel1.A1" office:value-type="string">
              <text:p text:style-name="Table_20_Heading">Doel</text:p>
            </table:table-cell>
            <table:table-cell table:style-name="Tabel1.A1" office:value-type="string">
              <text:p text:style-name="Table_20_Heading">Toepassing PerfectSupplement</text:p>
            </table:table-cell>
          </table:table-row>
        </table:table-header-rows>
        <table:table-row>
          <table:table-cell table:style-name="Tabel1.A1" office:value-type="string">
            <text:p text:style-name="Table_20_Contents"><text:span text:style-name="Strong_20_Emphasis">Attention</text:span></text:p>
          </table:table-cell>
          <table:table-cell table:style-name="Tabel1.A1" office:value-type="string">
            <text:p text:style-name="Table_20_Contents">Grijp de aandacht</text:p>
          </table:table-cell>
          <table:table-cell table:style-name="Tabel1.A1" office:value-type="string">
            <text:p text:style-name="Table_20_Contents">Hero met herkenningsmoment: "Ken je dit gevoel?"</text:p>
          </table:table-cell>
        </table:table-row>
        <table:table-row>
          <table:table-cell table:style-name="Tabel1.A1" office:value-type="string">
            <text:p text:style-name="Table_20_Contents"><text:span text:style-name="Strong_20_Emphasis">Interest</text:span></text:p>
          </table:table-cell>
          <table:table-cell table:style-name="Tabel1.A1" office:value-type="string">
            <text:p text:style-name="Table_20_Contents">Wek interesse op</text:p>
          </table:table-cell>
          <table:table-cell table:style-name="Tabel1.A1" office:value-type="string">
            <text:p text:style-name="Table_20_Contents">Mechanisme uitleggen: "Na 40 verandert er iets fundamenteels"</text:p>
          </table:table-cell>
        </table:table-row>
        <table:table-row>
          <table:table-cell table:style-name="Tabel1.A1" office:value-type="string">
            <text:p text:style-name="Table_20_Contents"><text:span text:style-name="Strong_20_Emphasis">Desire</text:span></text:p>
          </table:table-cell>
          <table:table-cell table:style-name="Tabel1.A1" office:value-type="string">
            <text:p text:style-name="Table_20_Contents">Wek behoefte op</text:p>
          </table:table-cell>
          <table:table-cell table:style-name="Tabel1.A1" office:value-type="string">
            <text:p text:style-name="Table_20_Contents">Resultaatbelofte: "In 3 minuten weet je waar je staat"</text:p>
          </table:table-cell>
        </table:table-row>
        <table:table-row>
          <table:table-cell table:style-name="Tabel1.A1" office:value-type="string">
            <text:p text:style-name="Table_20_Contents"><text:span text:style-name="Strong_20_Emphasis">Action</text:span></text:p>
          </table:table-cell>
          <table:table-cell table:style-name="Tabel1.A1" office:value-type="string">
            <text:p text:style-name="Table_20_Contents">Zet aan tot actie</text:p>
          </table:table-cell>
          <table:table-cell table:style-name="Tabel1.A1" office:value-type="string">
            <text:p text:style-name="Table_20_Contents">CTA: "Doe de gratis Leefstijlcheck →"</text:p>
          </table:table-cell>
        </table:table-row>
      </table:table>
      <text:h text:style-name="Heading_20_3" text:outline-level="3">TIPS-formule</text:h>
      <text:p text:style-name="Text_20_body">Verschil met AIDA: de "I" van TIPS (Influence) gaat niet om interesse wekken, maar om positief draagvlak creëren voor het latere aanbod.</text:p>
      <text:h text:style-name="Heading_20_4" text:outline-level="4">T — Trigger (Aandacht prikkelen)</text:h>
      <text:list text:style-name="L12">
        <text:list-item>
          <text:p text:style-name="P23">Eerste indruk is de bovenkant van de pagina </text:p>
        </text:list-item>
        <text:list-item>
          <text:p text:style-name="P23">80% leest de headline, 20% de rest </text:p>
        </text:list-item>
        <text:list-item>
          <text:p text:style-name="P23">De headline moet aansluiten op de steady state emotion </text:p>
        </text:list-item>
        <text:list-item>
          <text:p text:style-name="P24">Headlines tussen aanhalingstekens worden gemiddeld 28% meer gelezen </text:p>
        </text:list-item>
      </text:list>
      <text:p text:style-name="Text_20_body"><text:span text:style-name="Strong_20_Emphasis">Headline-principes:</text:span></text:p>
      <text:list text:style-name="L13">
        <text:list-item>
          <text:p text:style-name="P25">Headline verkoopt de copy, copy verkoopt het product </text:p>
        </text:list-item>
        <text:list-item>
          <text:p text:style-name="P25">Beschrijvende headline die nieuwsgierigheid wekt </text:p>
        </text:list-item>
        <text:list-item>
          <text:p text:style-name="P25">Afbeelding of video kan direct de emotie overkomen </text:p>
        </text:list-item>
        <text:list-item>
          <text:p text:style-name="P26">Emotie bepaalt gedrag (de affect heuristic): een opgewekte emotie draagt de lezer mee door de rest van de pagina </text:p>
        </text:list-item>
      </text:list>
      <text:p text:style-name="Text_20_body"><text:span text:style-name="Strong_20_Emphasis">Toepassing PerfectSupplement:</text:span></text:p>
      <text:list text:style-name="L14">
        <text:list-item>
          <text:p text:style-name="P27">Bij Leefstijlcheck: schokeffect tonen (hoeveel impact slechte slaap, te weinig omega-3, te weinig eiwit hebben op lange termijn) </text:p>
        </text:list-item>
        <text:list-item>
          <text:p text:style-name="P27">Angst-trigger: "Wat gebeurt er als je leefstijl niet verbetert?" (healthspan/gezonde levensjaren) </text:p>
        </text:list-item>
        <text:list-item>
          <text:p text:style-name="P28">Altijd koppelen aan hoop: "Maar dit kun je veranderen" </text:p>
        </text:list-item>
      </text:list>
      <text:h text:style-name="Heading_20_4" text:outline-level="4">I — Influence (Vertrouwen opbouwen)</text:h>
      <text:p text:style-name="Text_20_body">Voordat je je aanbod doet, moet je geloofwaardig overkomen. "We kopen sneller van iemand die we vertrouwen."</text:p>
      <text:p text:style-name="Text_20_body"><text:span text:style-name="Strong_20_Emphasis">Het Halo Effect — drie vormen:</text:span></text:p>
      <table:table table:name="Tabel2" table:style-name="Tabel2">
        <table:table-column table:style-name="Tabel2.A"/>
        <table:table-column table:style-name="Tabel2.B"/>
        <table:table-column table:style-name="Tabel2.C"/>
        <table:table-header-rows>
          <table:table-row>
            <table:table-cell table:style-name="Tabel2.A1" office:value-type="string">
              <text:p text:style-name="Table_20_Heading">Type</text:p>
            </table:table-cell>
            <table:table-cell table:style-name="Tabel2.A1" office:value-type="string">
              <text:p text:style-name="Table_20_Heading">Omschrijving</text:p>
            </table:table-cell>
            <table:table-cell table:style-name="Tabel2.A1" office:value-type="string">
              <text:p text:style-name="Table_20_Heading">Toepassing PerfectSupplement</text:p>
            </table:table-cell>
          </table:table-row>
        </table:table-header-rows>
        <table:table-row>
          <table:table-cell table:style-name="Tabel2.A1" office:value-type="string">
            <text:p text:style-name="Table_20_Contents"><text:span text:style-name="Strong_20_Emphasis">De Autoriteit</text:span></text:p>
          </table:table-cell>
          <table:table-cell table:style-name="Tabel2.A1" office:value-type="string">
            <text:p text:style-name="Table_20_Contents">Je bent de grootste of de meest gelauwerde</text:p>
          </table:table-cell>
          <table:table-cell table:style-name="Tabel2.A1" office:value-type="string">
            <text:p text:style-name="Table_20_Contents">Methodologie tonen, wetenschappelijke bronnen, EFSA-claims</text:p>
          </table:table-cell>
        </table:table-row>
        <table:table-row>
          <table:table-cell table:style-name="Tabel2.A1" office:value-type="string">
            <text:p text:style-name="Table_20_Contents"><text:span text:style-name="Strong_20_Emphasis">Het Voorbeeld</text:span></text:p>
          </table:table-cell>
          <table:table-cell table:style-name="Tabel2.A1" office:value-type="string">
            <text:p text:style-name="Table_20_Contents">Je bent niet de expert maar behaalt resultaat</text:p>
          </table:table-cell>
          <table:table-cell table:style-name="Tabel2.A1" office:value-type="string">
            <text:p text:style-name="Table_20_Contents">Eigen verhaal: "Ik was waar jij nu bent"</text:p>
          </table:table-cell>
        </table:table-row>
        <table:table-row>
          <table:table-cell table:style-name="Tabel2.A1" office:value-type="string">
            <text:p text:style-name="Table_20_Contents"><text:span text:style-name="Strong_20_Emphasis">De Vriend</text:span></text:p>
          </table:table-cell>
          <table:table-cell table:style-name="Tabel2.A1" office:value-type="string">
            <text:p text:style-name="Table_20_Contents">Je hebt de gunfactor</text:p>
          </table:table-cell>
          <table:table-cell table:style-name="Tabel2.A1" office:value-type="string">
            <text:p text:style-name="Table_20_Contents">Warme toon, herkenning, "je bent niet alleen"</text:p>
          </table:table-cell>
        </table:table-row>
      </table:table>
      <text:p text:style-name="Text_20_body"><text:span text:style-name="Strong_20_Emphasis">Storytelling:</text:span></text:p>
      <text:list text:style-name="L15">
        <text:list-item>
          <text:p text:style-name="P29"><text:soft-page-break/>Niet de foto (eindresultaat) maar de film (de weg ernaartoe) </text:p>
        </text:list-item>
        <text:list-item>
          <text:p text:style-name="P29">Self-relevance effect: mensen houden van mensen die net als zij zijn </text:p>
        </text:list-item>
        <text:list-item>
          <text:p text:style-name="P29">"Ik was daar — zo waar jij nu bent — en ik kan je helpen waar ik nu ben" </text:p>
        </text:list-item>
        <text:list-item>
          <text:p text:style-name="P30">Altijd met WIIFM-focus </text:p>
        </text:list-item>
      </text:list>
      <text:p text:style-name="Text_20_body"><text:span text:style-name="Strong_20_Emphasis">"You can't sell anything if you can't tell anything"</text:span></text:p>
      <text:p text:style-name="Text_20_body"><text:span text:style-name="Strong_20_Emphasis">Social Proof — vormen:</text:span></text:p>
      <text:list text:style-name="L16">
        <text:list-item>
          <text:p text:style-name="P31"><text:span text:style-name="Strong_20_Emphasis">Testimonials</text:span>: klantervaringen in groepen van 3 (cheerleader effect). Via tekst op pagina of via platforms als Trustpilot / embedsocial.com </text:p>
        </text:list-item>
        <text:list-item>
          <text:p text:style-name="P31"><text:span text:style-name="Strong_20_Emphasis">Logo's</text:span>: merken/bedrijven waarmee je samenwerkt (supplementmerken, affiliate partners) </text:p>
        </text:list-item>
        <text:list-item>
          <text:p text:style-name="P31"><text:span text:style-name="Strong_20_Emphasis">Bandwagon effect</text:span>: vermeld hoeveel mensen de Leefstijlcheck al hebben gedaan. "Meer dan 500 mannen 40+ gingen je voor" — social learning theorie: mensen kiezen wat de meeste anderen ook kiezen </text:p>
        </text:list-item>
        <text:list-item>
          <text:p text:style-name="P32"><text:span text:style-name="Strong_20_Emphasis">Succescijfers</text:span>: aantal mensen dat verbetering liet zien na 30 dagen (uit herhaalmeting data) </text:p>
        </text:list-item>
      </text:list>
      <text:p text:style-name="Text_20_body"><text:span text:style-name="Strong_20_Emphasis">Toepassing PerfectSupplement:</text:span></text:p>
      <text:list text:style-name="L17">
        <text:list-item>
          <text:p text:style-name="P33">Testimonials verzamelen via intake feedback (al aanwezig in database) </text:p>
        </text:list-item>
        <text:list-item>
          <text:p text:style-name="P33">Bandwagon: aantal intake-sessies tonen op homepage/intake </text:p>
        </text:list-item>
        <text:list-item>
          <text:p text:style-name="P33">Logo's van supplementmerken op vergelijkingspagina's </text:p>
        </text:list-item>
        <text:list-item>
          <text:p text:style-name="P34">Succespercentages uit herhaalmeting-delta's (zodra data beschikbaar) </text:p>
        </text:list-item>
      </text:list>
      <text:h text:style-name="Heading_20_4" text:outline-level="4">P — Presentatie (Het aanbod)</text:h>
      <text:p text:style-name="Text_20_body"><text:span text:style-name="Emphasis">[Nog aan te vullen met verdere hoofdstukken]</text:span></text:p>
      <text:h text:style-name="Heading_20_4" text:outline-level="4">S — Sluiting (De conversie)</text:h>
      <text:p text:style-name="Text_20_body"><text:span text:style-name="Emphasis">[Nog aan te vullen met verdere hoofdstukken]</text:span></text:p>
      <text:h text:style-name="Heading_20_3" text:outline-level="3">Pagina-opbouw: Rijen (Mobile-First)</text:h>
      <text:p text:style-name="Text_20_body">Bouw een conversiepagina van boven naar beneden in rijen. Eerst structuur en verhaallijn bepalen, dan pas inhoud en details invullen.</text:p>
      <text:p text:style-name="Text_20_body"><text:span text:style-name="Strong_20_Emphasis">Kernregel</text:span>: "Remove 50% of your copy, then delete half of what's left."</text:p>
      <text:p text:style-name="Text_20_body">Ieder element op de pagina moet een doel hebben. Een rij zonder duidelijk doel → verwijderen of herformuleren.</text:p>
      <text:h text:style-name="Heading_20_3" text:outline-level="3">Journey-architectuur (uit intake)</text:h>
      <text:p text:style-name="Text_20_body">Vanuit de intake-resultaten kan de bezoeker kiezen uit:</text:p>
      <table:table table:name="Tabel3" table:style-name="Tabel3">
        <table:table-column table:style-name="Tabel3.A"/>
        <table:table-column table:style-name="Tabel3.B"/>
        <table:table-column table:style-name="Tabel3.C"/>
        <table:table-header-rows>
          <table:table-row>
            <table:table-cell table:style-name="Tabel3.A1" office:value-type="string">
              <text:p text:style-name="Table_20_Heading">Optie</text:p>
            </table:table-cell>
            <table:table-cell table:style-name="Tabel3.A1" office:value-type="string">
              <text:p text:style-name="Table_20_Heading">Omschrijving</text:p>
            </table:table-cell>
            <table:table-cell table:style-name="Tabel3.A1" office:value-type="string">
              <text:p text:style-name="Table_20_Heading">Toepassing</text:p>
            </table:table-cell>
          </table:table-row>
        </table:table-header-rows>
        <table:table-row>
          <table:table-cell table:style-name="Tabel3.A1" office:value-type="string">
            <text:p text:style-name="Table_20_Contents"><text:span text:style-name="Strong_20_Emphasis">Quick Wins</text:span></text:p>
          </table:table-cell>
          <table:table-cell table:style-name="Tabel3.A1" office:value-type="string">
            <text:p text:style-name="Table_20_Contents">Makkelijke aanpassingen, direct te doen</text:p>
          </table:table-cell>
          <table:table-cell table:style-name="Tabel3.A1" office:value-type="string">
            <text:p text:style-name="Table_20_Contents">Week 1 acties in Herstelplan</text:p>
          </table:table-cell>
        </table:table-row>
        <table:table-row>
          <table:table-cell table:style-name="Tabel3.A1" office:value-type="string">
            <text:p text:style-name="Table_20_Contents"><text:span text:style-name="Strong_20_Emphasis">Middellange termijn</text:span></text:p>
          </table:table-cell>
          <table:table-cell table:style-name="Tabel3.A1" office:value-type="string">
            <text:p text:style-name="Table_20_Contents">Duurzame leefstijlveranderingen</text:p>
          </table:table-cell>
          <table:table-cell table:style-name="Tabel3.A1" office:value-type="string">
            <text:p text:style-name="Table_20_Contents">30-dagenplan</text:p>
          </table:table-cell>
        </table:table-row>
        <table:table-row>
          <table:table-cell table:style-name="Tabel3.A1" office:value-type="string">
            <text:p text:style-name="Table_20_Contents"><text:span text:style-name="Strong_20_Emphasis">Lange termijn</text:span></text:p>
          </table:table-cell>
          <table:table-cell table:style-name="Tabel3.A1" office:value-type="string">
            <text:p text:style-name="Table_20_Contents">Structurele aanpassingen + supplementen</text:p>
          </table:table-cell>
          <table:table-cell table:style-name="Tabel3.A1" office:value-type="string">
            <text:p text:style-name="Table_20_Contents">Maand 2+ strategie</text:p>
          </table:table-cell>
        </table:table-row>
        <table:table-row>
          <table:table-cell table:style-name="Tabel3.A1" office:value-type="string">
            <text:p text:style-name="Table_20_Contents"><text:span text:style-name="Strong_20_Emphasis">Alles</text:span></text:p>
          </table:table-cell>
          <table:table-cell table:style-name="Tabel3.A1" office:value-type="string">
            <text:p text:style-name="Table_20_Contents">Compleet pakket</text:p>
          </table:table-cell>
          <table:table-cell table:style-name="Tabel3.A1" office:value-type="string">
            <text:p text:style-name="Table_20_Contents">Premium versie (toekomst?)</text:p>
          </table:table-cell>
        </table:table-row>
      </table:table>
      <text:p text:style-name="Horizontal_20_Line"/>
      <text:h text:style-name="Heading_20_2" text:outline-level="2"><text:soft-page-break/>Strategische Ideeën (uit notities)</text:h>
      <text:h text:style-name="Heading_20_3" text:outline-level="3">Coaches als Doorverwijzing</text:h>
      <text:list text:style-name="L18">
        <text:list-item>
          <text:p text:style-name="P35">Online leefstijlcoaches opzoeken en toevoegen als contacten </text:p>
        </text:list-item>
        <text:list-item>
          <text:p text:style-name="P35">Doorschakelmogelijkheid na Leefstijlcheck voor persoonlijk advies </text:p>
        </text:list-item>
        <text:list-item>
          <text:p text:style-name="P36">Past bij B2B white-label strategie (coaches gebruiken de intake voor hun cliënten) </text:p>
        </text:list-item>
      </text:list>
      <text:h text:style-name="Heading_20_3" text:outline-level="3">Premium Versie (toekomst)</text:h>
      <text:list text:style-name="L19">
        <text:list-item>
          <text:p text:style-name="P37">Meer persoonlijk advies na de gratis Leefstijlcheck </text:p>
        </text:list-item>
        <text:list-item>
          <text:p text:style-name="P37">Uitgebreider supplementadvies, persoonlijke follow-up </text:p>
        </text:list-item>
        <text:list-item>
          <text:p text:style-name="P38">Koppeling met leefstijlcoach </text:p>
        </text:list-item>
      </text:list>
      <text:h text:style-name="Heading_20_3" text:outline-level="3">Kortingscodes</text:h>
      <text:list text:style-name="L20">
        <text:list-item>
          <text:p text:style-name="P39">Toevoegen aan affiliate links voor extra conversie-incentive </text:p>
        </text:list-item>
        <text:list-item>
          <text:p text:style-name="P40">Past bij "verzilveren" fase van het Tornado-model </text:p>
        </text:list-item>
      </text:list>
      <text:p text:style-name="Horizontal_20_Line"/>
      <text:h text:style-name="Heading_20_2" text:outline-level="2">Nog Toe Te Voegen</text:h>
      <text:list text:style-name="L21">
        <text:list-item>
          <text:p text:style-name="P41">TIPS-formule: P (Presentatie) en S (Sluiting) </text:p>
        </text:list-item>
        <text:list-item>
          <text:p text:style-name="P41">Overige hoofdstukken uit het boek </text:p>
        </text:list-item>
        <text:list-item>
          <text:p text:style-name="P41">Concrete implementatie-acties per inzicht </text:p>
        </text:list-item>
        <text:list-item>
          <text:p text:style-name="P42">Koppeling met bestaande Tornado-implementatie-roadmap </text:p>
        </text:list-item>
      </text:list>
      <text:p text:style-name="Horizontal_20_Line"/>
      <text:h text:style-name="Heading_20_2" text:outline-level="2">Changelog</text:h>
      <table:table table:name="Tabel4" table:style-name="Tabel4">
        <table:table-column table:style-name="Tabel4.A"/>
        <table:table-column table:style-name="Tabel4.B"/>
        <table:table-header-rows>
          <table:table-row>
            <table:table-cell table:style-name="Tabel4.A1" office:value-type="string">
              <text:p text:style-name="Table_20_Heading">Datum</text:p>
            </table:table-cell>
            <table:table-cell table:style-name="Tabel4.A1" office:value-type="string">
              <text:p text:style-name="Table_20_Heading">Wijziging</text:p>
            </table:table-cell>
          </table:table-row>
        </table:table-header-rows>
        <table:table-row>
          <table:table-cell table:style-name="Tabel4.A1" office:value-type="string">
            <text:p text:style-name="Table_20_Contents">April 2026</text:p>
          </table:table-cell>
          <table:table-cell table:style-name="Tabel4.A1" office:value-type="string">
            <text:p text:style-name="Table_20_Contents">v1.0 — Hoofdstukken 8–12 samengevoegd uit WhatsApp-notities</text:p>
          </table:table-cell>
        </table:table-row>
        <table:table-row>
          <table:table-cell table:style-name="Tabel4.A1" office:value-type="string">
            <text:p text:style-name="P43"/>
          </table:table-cell>
          <table:table-cell table:style-name="Tabel4.A1" office:value-type="string">
            <text:p text:style-name="P43"/>
          </table:table-cell>
        </table:table-row>
      </table:table>
      <text:p text:style-name="Horizontal_20_Line"/>
      <text:p text:style-name="Text_20_body"><text:span text:style-name="Emphasis">Dit document groeit mee met het boek. Voeg nieuwe hoofdstukken toe en koppel inzichten aan concrete PerfectSupplement-acties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2:55:06.309860648</meta:creation-date>
    <dc:date>2026-04-29T12:55:45.434303980</dc:date>
    <meta:editing-duration>PT41S</meta:editing-duration>
    <meta:editing-cycles>1</meta:editing-cycles>
    <meta:document-statistic meta:table-count="4" meta:image-count="0" meta:object-count="0" meta:page-count="6" meta:paragraph-count="191" meta:word-count="1467" meta:character-count="10199" meta:non-whitespace-character-count="8901"/>
    <meta:generator>LibreOffice/25.8.6.2$Linux_X86_64 LibreOffice_project/580$Build-2</meta:generator>
  </office:meta>
</office:document-meta>
</file>